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95in"/>
    </style:style>
    <style:style style:name="Table1.B" style:family="table-column">
      <style:table-column-properties style:column-width="1.3132in"/>
    </style:style>
    <style:style style:name="Table1.C" style:family="table-column">
      <style:table-column-properties style:column-width="1.8694in"/>
    </style:style>
    <style:style style:name="Table1.D" style:family="table-column">
      <style:table-column-properties style:column-width="2.5604in"/>
    </style:style>
    <style:style style:name="Table1.A1" style:family="table-cell">
      <style:table-cell-properties style:vertical-align="middle" fo:padding="0.0194in" fo:border="none"/>
    </style:style>
    <style:style style:name="P1" style:family="paragraph" style:parent-style-name="Table_20_Contents">
      <style:text-properties fo:font-weight="bold"/>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paragraph-properties fo:margin-left="0in" fo:margin-right="0in" fo:text-indent="0in" style:auto-text-indent="false"/>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4">
      <style:paragraph-properties fo:margin-left="0in" fo:margin-right="0in" fo:text-indent="0in" style:auto-text-indent="false"/>
    </style:style>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T1" style:family="text">
      <style:text-properties fo:font-style="italic"/>
    </style:style>
    <style:style style:name="T2"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GHIÊN CỨU: ỨNG DỤNG GENERATIVE ADVERSARIAL NETWORKS (GAN) TRONG TẤN CÔNG QUA MẶT HỆ THỐNG HIDS/EDR DỰA TRÊN MACHINE LEARNING</text:p>
      <text:h text:style-name="Heading_20_3" text:outline-level="3">Tóm tắt</text:h>
      <text:p text:style-name="Text_20_body">Sự phát triển của Machine Learning (ML) đã nâng cao năng lực của các hệ thống Phát hiện Xâm nhập dựa trên Vật chủ (Host-based IDPS) và các giải pháp Phản ứng Điểm cuối (Endpoint Detection and Response - EDR). Tuy nhiên, các mô hình ML bản chất có lỗ hổng trước các cuộc tấn công đối nghịch (Adversarial Attacks). Bài nghiên cứu này khảo sát việc ứng dụng Generative Adversarial Networks (GAN) để tạo ra các mẫu mã độc tàng hình thông qua việc tinh chỉnh dữ liệu kết xuất bộ nhớ (Memory Dump), nhằm qua mặt các bộ não ML phân tích trên nền tảng đám mây (Cloud Brain). Qua đó, đề tài phân tích các giải pháp hiện tại và đề xuất một mô hình thực nghiệm sử dụng cơ chế Differential Attention kết hợp GAN trên tập dữ liệu CIC-MalMem-2022.</text:p>
      <text:p text:style-name="Horizontal_20_Line"/>
      <text:h text:style-name="Heading_20_3" text:outline-level="3">I. Khảo sát chi tiết (Survey &amp; Literature Review)</text:h>
      <text:p text:style-name="Text_20_body">Trong lĩnh vực An toàn thông tin hiện đại, mã độc ngày càng tinh vi với các kỹ thuật "Fileless Malware" (mã độc không dùng file) hoạt động trực tiếp trên RAM. Để đối phó, các hệ thống EDR không còn quét file tĩnh mà chuyển sang giám sát phân tích bộ nhớ (Memory Forensics). Tuy nhiên, phương pháp tiếp cận Học đối nghịch (Adversarial Machine Learning) chứng minh rằng các mô hình phòng thủ này vẫn có thể bị đánh lừa bằng việc chỉnh sửa các đặc trưng phi chức năng (non-functional features) trong không gian bộ nhớ.</text:p>
      <text:p text:style-name="Text_20_body">Dưới đây là 3 nghiên cứu định hình cách tiếp cận sử dụng GAN để tấn công hệ thống phân tích mã độc:</text:p>
      <text:p text:style-name="P2">1. Khung IDSGAN (Lin et al., 2018 - <text:span text:style-name="T1">PAKDD</text:span>)</text:p>
      <text:list text:style-name="L16">
        <text:list-item>
          <text:p text:style-name="P20"><text:span text:style-name="T2">Dữ liệu thực nghiệm:</text:span> Đánh giá trên tập dữ liệu mạng <text:span text:style-name="T2">NSL-KDD</text:span>.</text:p>
        </text:list-item>
        <text:list-item>
          <text:p text:style-name="P20"><text:span text:style-name="T2">Cơ chế kỹ thuật lõi:</text:span> Bài báo giải quyết bài toán bảo toàn mã độc bằng cơ chế phân tách đặc trưng cứng (Hard-split). IDSGAN chia vector luồng mạng thành 2 phần: <text:span text:style-name="T1">Intrinsic features</text:span> (đặc trưng bản chất như loại giao thức TCP/UDP, trạng thái cờ hiệu) và <text:span text:style-name="T1">Non-intrinsic features</text:span> (đặc trưng môi trường có thể đổi như thời lượng kết nối <text:span text:style-name="Source_20_Text">duration</text:span>, số lượng byte <text:span text:style-name="Source_20_Text">src_bytes</text:span>). Generator của IDSGAN bị giới hạn phần cứng, <text:span text:style-name="T2">chỉ được phép cộng nhiễu (perturbations) vào các non-intrinsic features</text:span>, trong khi các đặc trưng bản chất bị khóa chặt.</text:p>
        </text:list-item>
        <text:list-item>
          <text:p text:style-name="P20"><text:span text:style-name="T2">Đóng góp:</text:span> Discriminator không phân biệt dữ liệu thật/giả như GAN truyền thống, mà nó đóng vai trò gửi request liên tục vào một hệ thống Black-box IDS để học lỏm ranh giới quyết định (decision boundary), từ đó dắt mũi Generator sinh nhiễu lách luật thành công.</text:p>
        </text:list-item>
      </text:list>
      <text:p text:style-name="P2">2. Khung MalGAN (Hu &amp; Tan, 2017)</text:p>
      <text:list text:style-name="L17">
        <text:list-item>
          <text:p text:style-name="P21"><text:span text:style-name="T2">Dữ liệu thực nghiệm:</text:span> Tập dữ liệu API calls của các mẫu malware (Không gian đặc trưng nhị phân - Binary features).</text:p>
        </text:list-item>
        <text:list-item>
          <text:p text:style-name="P21"><text:span text:style-name="T2">Cơ chế kỹ thuật lõi:</text:span> Không gian mã độc dạng file rất khắt khe. MalGAN biểu diễn mã độc dưới dạng vector nhị phân (có gọi API A thì bằng 1, không gọi thì bằng 0). Để giữ cho file <text:soft-page-break/>mã độc không bị crash khi chạy thực tế, thuật toán của MalGAN quy định Generator <text:span text:style-name="T2">chỉ được phép thêm API rác (đổi 0 thành 1)</text:span>, tuyệt đối không được xóa các API cốt lõi (không được đổi 1 thành 0).</text:p>
        </text:list-item>
        <text:list-item>
          <text:p text:style-name="P21"><text:span text:style-name="T2">Đóng góp:</text:span> Sáng tạo lớn nhất là kiến trúc <text:span text:style-name="T2">Substitute Detector</text:span>. Kẻ tấn công dùng mô hình này để copy "não" của hệ thống EDR thật. Generator sau đó dùng gradient tính toán từ chính Substitute Detector để tối ưu hóa vector nhiễu, qua mặt hoàn toàn các bộ phân loại Random Forest và Logistic Regression tĩnh.</text:p>
        </text:list-item>
      </text:list>
      <text:p text:style-name="P2">3. Tích hợp Self-Attention với SGAN-IDS (Al-Turaiki et al., 2023 - <text:span text:style-name="T1">Sensors</text:span>)</text:p>
      <text:list text:style-name="L18">
        <text:list-item>
          <text:p text:style-name="P22"><text:span text:style-name="T2">Dữ liệu thực nghiệm:</text:span> Các tập dữ liệu mạng hiện đại quy mô lớn như <text:span text:style-name="T2">CIC-IDS-2017</text:span> và NSL-KDD.</text:p>
        </text:list-item>
        <text:list-item>
          <text:p text:style-name="P22"><text:span text:style-name="T2">Cơ chế kỹ thuật lõi:</text:span> Các mạng GAN dùng Multi-Layer Perceptron (MLP) truyền thống thường bị mất dấu tương quan chéo giữa các thông số (ví dụ: số gói tin gửi đi luôn tỉ lệ với số byte nhận về). SGAN-IDS khắc phục bằng cách nhúng một lớp <text:span text:style-name="T2">Self-Attention</text:span> vào cả Generator và Discriminator. Lớp Attention tính toán ma trận trọng số cho toàn bộ vector đầu vào, giúp mô hình tự nhận thức được việc nếu chèn nhiễu vào cột A thì phải bù trừ ở cột B để luồng mạng trông tự nhiên nhất.</text:p>
        </text:list-item>
        <text:list-item>
          <text:p text:style-name="P22"><text:span text:style-name="T2">Kết quả đo lường:</text:span> Thực nghiệm tấn công vào 5 mô hình Black-box IDS khác nhau, cơ chế Attention đã giúp giảm trực tiếp trung bình <text:span text:style-name="T2">15.93%</text:span> các chỉ số Detection Rate, Precision và F1-Score của toàn bộ hệ thống phòng thủ.</text:p>
        </text:list-item>
      </text:list>
      <text:p text:style-name="Horizontal_20_Line"/>
      <text:h text:style-name="Heading_20_3" text:outline-level="3">II. Phân tích, So sánh và Đánh giá Hướng nghiên cứu tương lai</text:h>
      <text:h text:style-name="Heading_20_4" text:outline-level="4">1. Đánh giá Ưu và Nhược điểm (Phân tích Kỹ thuật)</text:h>
      <text:p text:style-name="Text_20_body">Thay vì đánh giá chung chung, ma trận dưới đây tập trung vào giới hạn trong kiến trúc mạng của các nghiên cứu tiền nhiệm để làm bước đệm cho mô hình của đồ á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Giải pháp / Khung</text:p>
            </table:table-cell>
            <table:table-cell table:style-name="Table1.A1" office:value-type="string">
              <text:p text:style-name="Table_20_Heading">Không gian Tấn công</text:p>
            </table:table-cell>
            <table:table-cell table:style-name="Table1.A1" office:value-type="string">
              <text:p text:style-name="Table_20_Heading">Đóng góp Kiến trúc Cốt lõi</text:p>
            </table:table-cell>
            <table:table-cell table:style-name="Table1.A1" office:value-type="string">
              <text:p text:style-name="Table_20_Heading">Hạn chế Kỹ thuật (Điểm mù kiến trúc)</text:p>
            </table:table-cell>
          </table:table-row>
        </table:table-header-rows>
        <table:table-row>
          <table:table-cell table:style-name="Table1.A1" office:value-type="string">
            <text:p text:style-name="P1">IDSGAN</text:p>
          </table:table-cell>
          <table:table-cell table:style-name="Table1.A1" office:value-type="string">
            <text:p text:style-name="Table_20_Contents">Feature-Space (Dữ liệu mạng NSL-KDD)</text:p>
          </table:table-cell>
          <table:table-cell table:style-name="Table1.A1" office:value-type="string">
            <text:p text:style-name="Table_20_Contents">Thiết lập luật phân tách cứng (<text:span text:style-name="T1">Functional</text:span> và <text:span text:style-name="T1">Non-functional features</text:span>) ngay tại đầu vào của Generator.</text:p>
          </table:table-cell>
          <table:table-cell table:style-name="Table1.A1" office:value-type="string">
            <text:p text:style-name="Table_20_Contents">Các vector nhiễu sinh ra rời rạc, không nắm bắt được chuỗi logic thời gian hoặc tương quan động của các thông số hệ thống.</text:p>
          </table:table-cell>
        </table:table-row>
        <table:table-row>
          <table:table-cell table:style-name="Table1.A1" office:value-type="string">
            <text:p text:style-name="P1">MalGAN</text:p>
          </table:table-cell>
          <table:table-cell table:style-name="Table1.A1" office:value-type="string">
            <text:p text:style-name="Table_20_Contents">Feature-Space (Dữ liệu nhị phân - Binary API)</text:p>
          </table:table-cell>
          <table:table-cell table:style-name="Table1.A1" office:value-type="string">
            <text:p text:style-name="Table_20_Contents">Xây dựng thuật toán <text:span text:style-name="T1">Substitute Detector</text:span> để lấy cắp hàm phân phối xác suất của Black-box EDR.</text:p>
          </table:table-cell>
          <table:table-cell table:style-name="Table1.A1" office:value-type="string">
            <text:p text:style-name="Table_20_Contents">Kiến trúc chỉ thiết kế để chèn nhiễu một chiều (thêm API <text:span text:style-name="Source_20_Text">0 -&gt; 1</text:span>). Không xử lý được dữ liệu liên tục (Continuous data) như số đếm tài nguyên RAM.</text:p>
          </table:table-cell>
        </table:table-row>
        <table:table-row>
          <table:table-cell table:style-name="Table1.A1" office:value-type="string">
            <text:p text:style-name="P1">SGAN-IDS</text:p>
          </table:table-cell>
          <table:table-cell table:style-name="Table1.A1" office:value-type="string">
            <text:p text:style-name="Table_20_Contents">Feature-Space (Dữ liệu mạng CIC-IDS-2017)</text:p>
          </table:table-cell>
          <table:table-cell table:style-name="Table1.A1" office:value-type="string">
            <text:p text:style-name="Table_20_Contents">Tích hợp ma trận <text:span text:style-name="T1">Self-Attention</text:span> để bắt các tương quan dài hạn, tạo ra mẫu đối nghịch có độ tự nhiên cao.</text:p>
          </table:table-cell>
          <table:table-cell table:style-name="Table1.A1" office:value-type="string">
            <text:p text:style-name="Table_20_Contents">Cơ chế Attention tiêu chuẩn <text:span text:style-name="T2">không có khả năng triệt tiêu nhiễu nền (thiếu sự xuất hiện của các trọng số âm)</text:span>, khiến mô hình tiêu hao nhiều tài nguyên và khó hội tụ trên các tập dữ liệu phức tạp.</text:p>
          </table:table-cell>
        </table:table-row>
      </table:table>
      <text:p text:style-name="Text_20_body"/>
      <text:h text:style-name="Heading_20_4" text:outline-level="4"><text:soft-page-break/>2. Hướng nghiên cứu tương lai</text:h>
      <text:list text:style-name="L10">
        <text:list-item>
          <text:p text:style-name="P13"><text:span text:style-name="T2">Tấn công Không gian thực (Problem-Space Realization):</text:span> Chuyển hóa kết quả từ không gian đặc trưng (như yêu cầu từ GAN về việc tăng số lượng handles/threads) thành các đoạn mã giả (dead code) hoặc tiến trình rác thực tế trên mã nguồn C/C++ của mã độc, đảm bảo tính toàn vẹn bộ nhớ khi chạy thực.</text:p>
        </text:list-item>
        <text:list-item>
          <text:p text:style-name="P13"><text:span text:style-name="T2">Adversarial Training làm cơ chế phòng thủ:</text:span> Sử dụng chính dữ liệu sinh ra từ các mô hình GAN để huấn luyện lại các hạt nhân (Cloud Brain) của hệ thống EDR, ép mô hình học được ranh giới quyết định (decision boundary) phức tạp và bền vững hơn.</text:p>
        </text:list-item>
      </text:list>
      <text:p text:style-name="Horizontal_20_Line"/>
      <text:h text:style-name="Heading_20_3" text:outline-level="3">III. Mở rộng: Thực nghiệm và Mô phỏng kiến trúc Differential Attention GAN</text:h>
      <text:p text:style-name="Text_20_body">Dựa trên các phân tích, bài nghiên cứu đề xuất một mô hình thực nghiệm bám sát kiến trúc triển khai thực tế của các giải pháp EDR hiện đại.</text:p>
      <text:h text:style-name="Heading_20_4" text:outline-level="4">1. Bối cảnh Hệ thống Thực nghiệm (System Architecture Scenario)</text:h>
      <text:p text:style-name="Text_20_body">Thực nghiệm mô phỏng kiến trúc giám sát <text:span text:style-name="T2">Endpoint - Cloud Brain</text:span> (Cảm biến điểm cuối - Bộ não đám mây):</text:p>
      <text:list text:style-name="L11">
        <text:list-item>
          <text:p text:style-name="P14"><text:span text:style-name="T2">Trên Máy trạm (Endpoint):</text:span> Chỉ cài đặt một Cảm biến siêu nhẹ (Lightweight Sensor). Cảm biến này thực hiện chức năng thu thập chứng cứ sống (Live Memory Acquisition), lấy ra các dữ liệu đo lường (Telemetry) từ bộ nhớ RAM theo thời gian thực mà không làm gián đoạn máy tính.</text:p>
        </text:list-item>
        <text:list-item>
          <text:p text:style-name="P14"><text:span text:style-name="T2">Trên Đám mây (Cloud IDPS):</text:span> Dữ liệu Telemetry được gửi về máy chủ trung tâm. Một mô hình AI chuyên sâu sẽ phân tích mảng số liệu này để phát hiện mã độc.</text:p>
        </text:list-item>
        <text:list-item>
          <text:p text:style-name="P14"><text:span text:style-name="T2">Mục tiêu của cuộc tấn công:</text:span> Sử dụng GAN trong phòng thí nghiệm (Offline Lab) để tìm ra "công thức nhiễu" tối ưu. Kẻ tấn công sẽ biết cần chèn thêm các hành vi rác nào vào mã độc để khi Cảm biến Endpoint trích xuất RAM, bảng dữ liệu gửi lên Cloud sẽ trông hoàn toàn vô hại.</text:p>
        </text:list-item>
      </text:list>
      <text:h text:style-name="Heading_20_4" text:outline-level="4">2. Chuẩn bị và Tiền xử lý dữ liệu (CIC-MalMem-2022)</text:h>
      <text:p text:style-name="Text_20_body">Nghiên cứu sử dụng tập dữ liệu CIC-MalMem-2022, chứa các thông số trích xuất từ RAM qua công cụ Volatility. Quá trình tiền xử lý được kiểm soát bằng tư duy bảo mật nghiêm ngặt (Hard-coded Feature Selection):</text:p>
      <text:list text:style-name="L12">
        <text:list-item>
          <text:p text:style-name="P15"><text:span text:style-name="T2">Chuẩn hóa nhãn:</text:span> Nhãn của các họ mã độc được quy chuẩn hóa (ví dụ: <text:span text:style-name="Source_20_Text">CoolWebSearch</text:span> được map cứng thành <text:span text:style-name="Source_20_Text">CWS</text:span>) nhằm loại bỏ nhiễu nhãn (label noise). Cột <text:span text:style-name="Source_20_Text">Category</text:span> được loại bỏ để tập trung vào phân loại nhị phân.</text:p>
        </text:list-item>
        <text:list-item>
          <text:p text:style-name="P15"><text:span text:style-name="T2">Phân tách Đặc trưng Phi chức năng (GAN được thay đổi):</text:span> Giới hạn ở các thông số môi trường hệ thống như <text:span text:style-name="Source_20_Text">pslist.nproc</text:span>, <text:span text:style-name="Source_20_Text">dlllist.ndlls</text:span>, <text:span text:style-name="Source_20_Text">handles.nport</text:span>, <text:span text:style-name="Source_20_Text">svcscan.nactive</text:span>. Đây là những số liệu mà mã độc có thể sinh thêm mà không tự làm hỏng chính mình.</text:p>
        </text:list-item>
        <text:list-item>
          <text:p text:style-name="P15"><text:soft-page-break/><text:span text:style-name="T2">Bảo vệ Đặc trưng Chức năng (Cấm thay đổi):</text:span> Các hành vi cốt lõi như tiêm bộ nhớ (<text:span text:style-name="Source_20_Text">malfind.ninjections</text:span>) hoặc tiến trình ẩn (<text:span text:style-name="Source_20_Text">psxview.not_in_eprocess_pool</text:span>) được bảo lưu nguyên vẹn để giữ bản chất phá hoại của mã độc.</text:p>
        </text:list-item>
      </text:list>
      <text:h text:style-name="Heading_20_4" text:outline-level="4">3. Kiến trúc Đề xuất: Differential Attention GAN</text:h>
      <text:p text:style-name="Text_20_body"><text:span text:style-name="T2">Kẻ tấn công - Mô hình Máy phát (Generator):</text:span> Kiến trúc tích hợp cơ chế <text:span text:style-name="T2">Differential Attention</text:span>.</text:p>
      <text:list text:style-name="L13">
        <text:list-item>
          <text:p text:style-name="P16"><text:span text:style-name="T2">Đặc tả kỹ thuật:</text:span> Thay vì dùng hàm softmax thông thường chỉ trả về số dương, Differential Attention tính toán sự khác biệt giữa hai bản đồ chú ý (attention maps). Sự xuất hiện của các trọng số âm (negative weights) là đặc tính toán học cốt lõi giúp Generator chủ động triệt tiêu (cancel out) các tín hiệu nhiễu không mong muốn từ dữ liệu RAM nền. Mô hình tính toán chính xác việc tăng/giảm các tham số tài nguyên hệ thống (handles, threads) để ngụy trang bản chất của mã độc.</text:p>
        </text:list-item>
      </text:list>
      <text:p text:style-name="Text_20_body"><text:span text:style-name="T2">Mục tiêu giả lập - Bộ phân loại Cloud IDPS (Discriminator):</text:span> Mô phỏng bộ não ML trên nền tảng đám mây đối phó với dữ liệu mất cân bằng.</text:p>
      <text:list text:style-name="L14">
        <text:list-item>
          <text:p text:style-name="P17"><text:span text:style-name="T2">Hàm mất mát (Focal Loss):</text:span> Áp dụng Focal Loss để tự động giảm trọng số của các mẫu dễ phân loại và tập trung phạt nặng vào các mẫu đối nghịch khó nhằn từ Generator.</text:p>
        </text:list-item>
        <text:list-item>
          <text:p text:style-name="P18"><text:span text:style-name="T2">Đặc tả kỹ thuật:</text:span> Trong thuật toán Gradient Descent, hệ số cân bằng lớp (α) phải được áp dụng hoàn toàn tuyến tính. Việc tuyệt đối không sử dụng các phép lũy thừa sai lệch (exponentiation) lên hệ số này giúp không gian gradient ổn định, ngăn chặn sự sụp đổ định tuyến của Discriminator trong "trò chơi zero-sum".</text:p>
        </text:list-item>
      </text:list>
      <text:h text:style-name="Heading_20_4" text:outline-level="4">4. Quy trình Mô phỏng</text:h>
      <text:list text:style-name="L15">
        <text:list-item>
          <text:p text:style-name="P19">Nạp đặc trưng RAM của mã độc vào bộ Generator có tích hợp Differential Attention.</text:p>
        </text:list-item>
        <text:list-item>
          <text:p text:style-name="P19">Generator sinh ra vector nhiễu bù đắp, thay đổi các thông số môi trường của bản kết xuất bộ nhớ.</text:p>
        </text:list-item>
        <text:list-item>
          <text:p text:style-name="P19">Chuyển tiếp mẫu dữ liệu đối nghịch (đã ngụy trang) vào mô hình Discriminator (đóng vai trò Cloud ML).</text:p>
        </text:list-item>
        <text:list-item>
          <text:p text:style-name="P19">Tính toán <text:span text:style-name="T2">Tỉ lệ qua mặt (Evasion Rate)</text:span>: Tỉ lệ phần trăm các mẫu mã độc có chứa đặc trưng nguy hiểm nhưng bị hệ thống ML phân loại sai thành tiến trình an toàn (Benig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22:10:48.571336686</meta:creation-date>
    <dc:date>2026-04-13T23:17:31.294919561</dc:date>
    <meta:editing-duration>PT1H6M42S</meta:editing-duration>
    <meta:editing-cycles>3</meta:editing-cycles>
    <meta:generator>LibreOffice/24.2.7.2$Linux_X86_64 LibreOffice_project/420$Build-2</meta:generator>
    <meta:document-statistic meta:table-count="1" meta:image-count="0" meta:object-count="0" meta:page-count="4" meta:paragraph-count="63" meta:word-count="1912" meta:character-count="9627" meta:non-whitespace-character-count="7802"/>
  </office:meta>
</office:document-meta>
</file>