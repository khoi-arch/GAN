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6931in" table:align="left"/>
    </style:style>
    <style:style style:name="Table1.A" style:family="table-column">
      <style:table-column-properties style:column-width="1.2083in"/>
    </style:style>
    <style:style style:name="Table1.B" style:family="table-column">
      <style:table-column-properties style:column-width="0.484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0083in" table:align="left"/>
    </style:style>
    <style:style style:name="Table2.A" style:family="table-column">
      <style:table-column-properties style:column-width="1.5236in"/>
    </style:style>
    <style:style style:name="Table2.B" style:family="table-column">
      <style:table-column-properties style:column-width="0.484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3236in" table:align="left"/>
    </style:style>
    <style:style style:name="Table3.A" style:family="table-column">
      <style:table-column-properties style:column-width="0.9222in"/>
    </style:style>
    <style:style style:name="Table3.B" style:family="table-column">
      <style:table-column-properties style:column-width="0.401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7583in" table:align="left"/>
    </style:style>
    <style:style style:name="Table4.A" style:family="table-column">
      <style:table-column-properties style:column-width="1.3569in"/>
    </style:style>
    <style:style style:name="Table4.B" style:family="table-column">
      <style:table-column-properties style:column-width="0.401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3618in" table:align="left"/>
    </style:style>
    <style:style style:name="Table5.A" style:family="table-column">
      <style:table-column-properties style:column-width="1.4306in"/>
    </style:style>
    <style:style style:name="Table5.B" style:family="table-column">
      <style:table-column-properties style:column-width="1.9313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ẤN ĐỀ 2 — Clipping hiện tại vẫn global-statistical</text:h>
      <text:p text:style-name="Text_20_body">Ví dụ:</text:p>
      <text:section text:style-name="Sect1" text:name="code-block-viewer">
        <text:p text:style-name="P1"><text:span text:style-name="Source_20_Text">q25 - 3*iqr</text:span></text:p>
      </text:section>
      <text:p text:style-name="Text_20_body">vẫn là statistical heuristic.</text:p>
      <text:p text:style-name="Horizontal_20_Line"/>
      <text:h text:style-name="Heading_20_1" text:outline-level="1">Trong malware:</text:h>
      <text:p text:style-name="Text_20_body">Có những family:</text:p>
      <text:list text:style-name="L1">
        <text:list-item>
          <text:p text:style-name="P3">intentionally extreme </text:p>
        </text:list-item>
        <text:list-item>
          <text:p text:style-name="P3">process explosion </text:p>
        </text:list-item>
        <text:list-item>
          <text:p text:style-name="P3">handle flooding </text:p>
        </text:list-item>
        <text:list-item>
          <text:p text:style-name="P2">dll flooding </text:p>
        </text:list-item>
      </text:list>
      <text:p text:style-name="Text_20_body">=&gt; chính tail là signal.</text:p>
      <text:p text:style-name="Horizontal_20_Line"/>
      <text:h text:style-name="Heading_20_1" text:outline-level="1">Gợi ý tốt hơn</text:h>
      <text:p text:style-name="Text_20_body">Thay vì:</text:p>
      <text:section text:style-name="Sect1" text:name="Section1">
        <text:p text:style-name="P1"><text:bookmark text:name="code-block-viewer"/><text:span text:style-name="Source_20_Text">global statistics</text:span></text:p>
      </text:section>
      <text:p text:style-name="Text_20_body">có thể:</text:p>
      <text:list text:style-name="L2">
        <text:list-item>
          <text:p text:style-name="P5">class-conditional clipping </text:p>
        </text:list-item>
        <text:list-item>
          <text:p text:style-name="P4">family-aware clipping </text:p>
        </text:list-item>
      </text:list>
      <text:p text:style-name="Text_20_body">Ví dụ:</text:p>
      <text:list text:style-name="L3">
        <text:list-item>
          <text:p text:style-name="P7">benign distribution </text:p>
        </text:list-item>
        <text:list-item>
          <text:p text:style-name="P6">malware distribution </text:p>
        </text:list-item>
      </text:list>
      <text:p text:style-name="Text_20_body">tách riêng.</text:p>
      <text:p text:style-name="Horizontal_20_Line"/>
      <text:p text:style-name="Standard"/>
      <text:p text:style-name="Standard"/>
      <text:p text:style-name="Standard"/>
      <text:h text:style-name="Heading_20_1" text:outline-level="1"><text:soft-page-break/>Functional/non-functional split rất mạnh nhưng cũng risky</text:h>
      <text:p text:style-name="Text_20_body">Ý tưởng đúng.</text:p>
      <text:p text:style-name="Text_20_body">Nhưng nếu:</text:p>
      <text:section text:style-name="Sect1" text:name="Section2">
        <text:p text:style-name="P1"><text:bookmark text:name="code-block-viewer Copy 1"/><text:span text:style-name="Source_20_Text">functional_cols</text:span></text:p>
      </text:section>
      <text:p text:style-name="Text_20_body">quá rigid,<text:line-break/>generator sẽ:</text:p>
      <text:list text:style-name="L4">
        <text:list-item>
          <text:p text:style-name="P9">thiếu freedom </text:p>
        </text:list-item>
        <text:list-item>
          <text:p text:style-name="P8">khó evade detector mạnh </text:p>
        </text:list-item>
      </text:list>
      <text:p text:style-name="Horizontal_20_Line"/>
      <text:h text:style-name="Heading_20_1" text:outline-level="1">Sau này có thể tốt hơn nếu:</text:h>
      <text:p text:style-name="Text_20_body">thay vì:</text:p>
      <text:section text:style-name="Sect1" text:name="Section3">
        <text:p text:style-name="P1"><text:bookmark text:name="code-block-viewer Copy 2"/><text:span text:style-name="Source_20_Text">immutable functional</text:span></text:p>
      </text:section>
      <text:p text:style-name="Text_20_body">dùng:</text:p>
      <text:section text:style-name="Sect1" text:name="Section4">
        <text:p text:style-name="P1"><text:bookmark text:name="code-block-viewer Copy 3"/><text:span text:style-name="Source_20_Text">soft perturbation budget</text:span></text:p>
      </text:section>
      <text:p text:style-name="Text_20_body">Ví dụ:</text:p>
      <text:list text:style-name="L5">
        <text:list-item>
          <text:p text:style-name="P11">functional chỉ được perturb ±5% </text:p>
        </text:list-item>
        <text:list-item>
          <text:p text:style-name="P10">hoặc masked perturbation </text:p>
        </text:list-item>
      </text:list>
      <text:p text:style-name="Text_20_body">Cái này thường evade tốt hơn hard-freeze.</text:p>
      <text:p text:style-name="Horizontal_20_Line"/>
      <text:p text:style-name="Standard"><text:line-break/><text:line-break/>Functional / non-functional split đang hard-code</text:p>
      <text:h text:style-name="Heading_20_2" text:outline-level="2">Hiện trạng</text:h>
      <text:p text:style-name="Text_20_body">Pipeline hiện tại hard-code danh sách:</text:p>
      <text:section text:style-name="Sect1" text:name="Section5">
        <text:p text:style-name="P1"><text:bookmark text:name="code-block-viewer Copy 4"/><text:span text:style-name="Source_20_Text">non_functional_cols = [...]</text:span></text:p>
      </text:section>
      <text:p text:style-name="Horizontal_20_Line"/>
      <text:h text:style-name="Heading_20_2" text:outline-level="2">Vấn đề</text:h>
      <text:p text:style-name="Text_20_body">Một số feature được xem là “non-functional” vẫn có thể mang:</text:p>
      <text:list text:style-name="L6">
        <text:list-item>
          <text:p text:style-name="P13">malware semantic </text:p>
        </text:list-item>
        <text:list-item>
          <text:p text:style-name="P13">persistence artifact </text:p>
        </text:list-item>
        <text:list-item>
          <text:p text:style-name="P12"><text:soft-page-break/>execution behavior </text:p>
        </text:list-item>
      </text:list>
      <text:p text:style-name="Text_20_body">Nếu perturb quá mạnh:</text:p>
      <text:list text:style-name="L7">
        <text:list-item>
          <text:p text:style-name="P15">sample mất realism </text:p>
        </text:list-item>
        <text:list-item>
          <text:p text:style-name="P14">malware behavior bị thay đổi </text:p>
        </text:list-item>
      </text:list>
      <text:p text:style-name="Horizontal_20_Line"/>
      <text:h text:style-name="Heading_20_2" text:outline-level="2">Đề xuất</text:h>
      <text:p text:style-name="Text_20_body">Nên dùng:</text:p>
      <text:list text:style-name="L8">
        <text:list-item>
          <text:p text:style-name="P17">SHAP analysis </text:p>
        </text:list-item>
        <text:list-item>
          <text:p text:style-name="P17">sensitivity analysis </text:p>
        </text:list-item>
        <text:list-item>
          <text:p text:style-name="P17">feature importance </text:p>
        </text:list-item>
        <text:list-item>
          <text:p text:style-name="P16">perturbation impact analysis </text:p>
        </text:list-item>
      </text:list>
      <text:p text:style-name="Text_20_body">để xác định:</text:p>
      <text:list text:style-name="L9">
        <text:list-item>
          <text:p text:style-name="P19">perturbable features </text:p>
        </text:list-item>
        <text:list-item>
          <text:p text:style-name="P18">immutable features </text:p>
        </text:list-item>
      </text:list>
      <text:p text:style-name="Text_20_body">thay vì chỉ dựa trên heuristic thủ công.</text:p>
      <text:p text:style-name="Horizontal_20_Line"/>
      <text:p text:style-name="Standard"/>
      <text:p text:style-name="Standard"/>
      <text:p text:style-name="Standard">xác định 1 oulier là signal hay fake:<text:line-break/><text:lin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Quantile Bounds</text:p>
          </table:table-cell>
          <table:table-cell table:style-name="Table1.A1" office:value-type="string">
            <text:p text:style-name="Table_20_Contents">10/10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Covariance Matching</text:p>
          </table:table-cell>
          <table:table-cell table:style-name="Table2.A1" office:value-type="string">
            <text:p text:style-name="Table_20_Contents">10/1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oft Density</text:p>
          </table:table-cell>
          <table:table-cell table:style-name="Table3.A1" office:value-type="string">
            <text:p text:style-name="Table_20_Contents">7/10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Likelihood Penalty</text:p>
          </table:table-cell>
          <table:table-cell table:style-name="Table4.A1" office:value-type="string">
            <text:p text:style-name="Table_20_Contents">5/10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Manifold Projection</text:p>
          </table:table-cell>
          <table:table-cell table:style-name="Table5.A1" office:value-type="string">
            <text:p text:style-name="Table_20_Contents">6/10 nhưng complexity cao</text:p>
          </table:table-cell>
        </table:table-row>
      </table:table>
      <text:p text:style-name="Standard"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an_bypass_idps/</text:p>
      <text:p text:style-name="Standard">│</text:p>
      <text:p text:style-name="Standard">├── gan(1).odt <text:s text:c="28"/>&lt;-- Báo cáo gốc của bạn</text:p>
      <text:p text:style-name="Standard">│</text:p>
      <text:p text:style-name="Standard">├── data_artifacts/ <text:s text:c="23"/>&lt;-- TẤT CẢ DATA VÀ KẾT QUẢ ĐỂ Ở ĐÂY (Không để code)</text:p>
      <text:p text:style-name="Standard">│ <text:s text:c="2"/>├── Obfuscated-MalMem2022.csv <text:s text:c="9"/>&lt;-- Ném file data CSV gốc vào đây</text:p>
      <text:p text:style-name="Standard">│ <text:s text:c="2"/>├── feature_stats.json <text:s text:c="16"/>(Sẽ đẻ ra sau khi chạy file 01)</text:p>
      <text:p text:style-name="Standard">│ <text:s text:c="2"/>├── feature_groups.json <text:s text:c="15"/>(Sẽ đẻ ra sau khi chạy file 02)</text:p>
      <text:p text:style-name="Standard">│ <text:s text:c="2"/>├── transform_metadata.pkl <text:s text:c="12"/>(Sẽ đẻ ra sau khi chạy file 03)</text:p>
      <text:p text:style-name="Standard">│ <text:s text:c="2"/>├── tensor_malware.pt <text:s text:c="17"/>(Sẽ đẻ ra sau khi chạy file 03)</text:p>
      <text:p text:style-name="Standard">│ <text:s text:c="2"/>├── tensor_benign.pt <text:s text:c="18"/>(Sẽ đẻ ra sau khi chạy file 03)</text:p>
      <text:p text:style-name="Standard">│ <text:s text:c="2"/>└── adversarial_policy.json <text:s text:c="11"/>(Sẽ đẻ ra sau khi chạy file 04)</text:p>
      <text:p text:style-name="Standard">│</text:p>
      <text:p text:style-name="Standard">├── Phase_1_DataPipeline/ <text:s text:c="17"/>&lt;-- BƯỚC 1: TIỀN XỬ LÝ (Thuần toán &amp; Thống kê)</text:p>
      <text:p text:style-name="Standard">│ <text:s text:c="2"/>├── 01_stats_extractor.py <text:s text:c="13"/>(Cày file CSV -&gt; Đẻ ra feature_stats.json)</text:p>
      <text:p text:style-name="Standard">│ <text:s text:c="2"/>├── 02_feature_profiler.py <text:s text:c="12"/>(Đọc Stats phân tích Binning/Rare -&gt; Đẻ ra feature_groups.json)</text:p>
      <text:p text:style-name="Standard">│ <text:s text:c="2"/>└── 03_tensor_builder.py <text:s text:c="14"/>(Đọc Groups để Scale, Clip -&gt; Đẻ ra Tensors &amp; Metadata)</text:p>
      <text:p text:style-name="Standard">│</text:p>
      <text:p text:style-name="Standard">├── Phase_2_TargetMapping/ <text:s text:c="16"/>&lt;-- BƯỚC 2: TÌM ĐIỂM YẾU EDR (SHAP &amp; Probing)</text:p>
      <text:p text:style-name="Standard">│ <text:s text:c="2"/>└── 04_space_mapper.py <text:s text:c="16"/>(Lấy Tensors train XGBoost, dò SHAP -&gt; Đẻ ra adversarial_policy.json)</text:p>
      <text:p text:style-name="Standard">│</text:p>
      <text:p text:style-name="Standard">└── Phase_3_GANTraining/ <text:s text:c="18"/>&lt;-- BƯỚC 3: HUẤN LUYỆN GAN (Sinh mã độc)</text:p>
      <text:p text:style-name="Standard"><text:s text:c="4"/>├── losses.py <text:s text:c="25"/>(Chứa FocalLoss và CovarianceMatchingLoss)</text:p>
      <text:p text:style-name="Standard"><text:s text:c="4"/>├── models.py <text:s text:c="25"/>(Chứa IDSGenerator tích hợp Constraint Layer và Discriminator)</text:p>
      <text:p text:style-name="Standard"><text:s text:c="4"/>└── main.py <text:s text:c="11"/>(Đọc Tensors + Policy, chạy Ablation Study so sánh 4 mô hình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9T21:28:26.312352154</meta:creation-date>
    <dc:date>2026-05-09T22:31:09.663832603</dc:date>
    <meta:editing-duration>PT16M12S</meta:editing-duration>
    <meta:editing-cycles>1</meta:editing-cycles>
    <meta:document-statistic meta:table-count="5" meta:image-count="0" meta:object-count="0" meta:page-count="4" meta:paragraph-count="96" meta:word-count="458" meta:character-count="3055" meta:non-whitespace-character-count="2335"/>
    <meta:generator>LibreOffice/24.2.7.2$Linux_X86_64 LibreOffice_project/420$Build-2</meta:generator>
  </office:meta>
</office:document-meta>
</file>